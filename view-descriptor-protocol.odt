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View Descriptor Protocol (VDP)</text:p>
      <text:p text:style-name="Preformatted_20_Text"/>
      <text:p text:style-name="Preformatted_20_Text">**Status:** Working Draft</text:p>
      <text:p text:style-name="Preformatted_20_Text">**Version:** 0.1.0</text:p>
      <text:p text:style-name="Preformatted_20_Text"/>
      <text:p text:style-name="Preformatted_20_Text">## Abstract</text:p>
      <text:p text:style-name="Preformatted_20_Text"/>
      <text:p text:style-name="Preformatted_20_Text">The View Descriptor Protocol (VDP) defines a standard mechanism for associating API data responses with the templates that should render them. A **view descriptor** is a JSON structure that identifies a root template by URL and declares how sub-templates compose into named slots, forming a recursive template tree. View descriptors can be transported via HTTP headers (for constrained formats like OData4) or inline in the response body (for flexible formats like HAL+JSON). The protocol is framework-agnostic — templates can be HTML/Qute, SwiftUI views, Compose layouts, or any other rendering format.</text:p>
      <text:p text:style-name="Preformatted_20_Text"/>
      <text:p text:style-name="Preformatted_20_Text">## 1. Problem Statement</text:p>
      <text:p text:style-name="Preformatted_20_Text"/>
      <text:p text:style-name="Preformatted_20_Text">REST APIs return structured data (JSON, XML) that carries no presentation information. The client must independently decide how to render this data — typically by hardcoding template choices into client logic. This creates tight coupling between API consumers and their rendering layer.</text:p>
      <text:p text:style-name="Preformatted_20_Text"/>
      <text:p text:style-name="Preformatted_20_Text">**VDP solves this by letting the server declare:**</text:p>
      <text:p text:style-name="Preformatted_20_Text">- Which template(s) to use for rendering a response</text:p>
      <text:p text:style-name="Preformatted_20_Text">- How templates compose together (which sub-template fills which slot)</text:p>
      <text:p text:style-name="Preformatted_20_Text"/>
      <text:p text:style-name="Preformatted_20_Text">**VDP explicitly does NOT define:**</text:p>
      <text:p text:style-name="Preformatted_20_Text">- How templates bind to data (that is the template engine's job — Qute expressions, JSONPath, etc.)</text:p>
      <text:p text:style-name="Preformatted_20_Text">- Styling or CSS class information (that belongs in the template itself)</text:p>
      <text:p text:style-name="Preformatted_20_Text">- Client-side state management</text:p>
      <text:p text:style-name="Preformatted_20_Text"/>
      <text:p text:style-name="Preformatted_20_Text">## 2. Terminology</text:p>
      <text:p text:style-name="Preformatted_20_Text"/>
      <text:p text:style-name="Preformatted_20_Text">- **View Descriptor**: A JSON object that describes a template tree — a root template URL and its slot assignments.</text:p>
      <text:p text:style-name="Preformatted_20_Text">- **Template URL**: A URL identifying a template resource. The URL MUST resolve to a renderable template in the client's rendering framework.</text:p>
      <text:p text:style-name="Preformatted_20_Text">- **Slot**: A named insertion point in a template where a sub-template can be composed. Slot names correspond to the template's own insertion point identifiers (e.g., Qute's `{#insert slotName}`, HTML's `&lt;slot name="slotName"&gt;`).</text:p>
      <text:p text:style-name="Preformatted_20_Text">- **View Descriptor Resource**: A standalone JSON document containing a view descriptor, addressable by its own URL, cacheable independently of the data it describes.</text:p>
      <text:p text:style-name="Preformatted_20_Text">- **Static Composition**: Template includes that are hardcoded within the template itself (e.g., a layout always including its `_head.html` partial). VDP does not manage these — they are the template's internal concern.</text:p>
      <text:p text:style-name="Preformatted_20_Text">- **Dynamic Composition**: Template slots whose content varies per API response. VDP manages these.</text:p>
      <text:p text:style-name="Preformatted_20_Text"/>
      <text:p text:style-name="Preformatted_20_Text">## 3. View Descriptor Format</text:p>
      <text:p text:style-name="Preformatted_20_Text"/>
      <text:p text:style-name="Preformatted_20_Text">### 3.1 Basic Structure (Single Template)</text:p>
      <text:p text:style-name="Preformatted_20_Text"/>
      <text:p text:style-name="Preformatted_20_Text">The simplest view descriptor points to a single template with no slots:</text:p>
      <text:p text:style-name="Preformatted_20_Text"/>
      <text:p text:style-name="Preformatted_20_Text">```json</text:p>
      <text:p text:style-name="Preformatted_20_Text">{</text:p>
      <text:p text:style-name="Preformatted_20_Text"><text:soft-page-break/><text:s text:c="2"/>"template": "https://example.com/templates/article.html"</text:p>
      <text:p text:style-name="Preformatted_20_Text">}</text:p>
      <text:p text:style-name="Preformatted_20_Text">```</text:p>
      <text:p text:style-name="Preformatted_20_Text"/>
      <text:p text:style-name="Preformatted_20_Text">### 3.2 Template Composition (Slots)</text:p>
      <text:p text:style-name="Preformatted_20_Text"/>
      <text:p text:style-name="Preformatted_20_Text">When a template has named insertion points that should be filled dynamically, the view descriptor declares a `slots` object. Each key is a slot name matching an insertion point in the template, and each value is itself a view descriptor:</text:p>
      <text:p text:style-name="Preformatted_20_Text"/>
      <text:p text:style-name="Preformatted_20_Text">```json</text:p>
      <text:p text:style-name="Preformatted_20_Text">{</text:p>
      <text:p text:style-name="Preformatted_20_Text"><text:s text:c="2"/>"template": "https://github.com/SiteNetSoft/quarkus-pha/templates/layouts/sidebar.html",</text:p>
      <text:p text:style-name="Preformatted_20_Text"><text:s text:c="2"/>"slots": {</text:p>
      <text:p text:style-name="Preformatted_20_Text"><text:s text:c="4"/>"mainContent": {</text:p>
      <text:p text:style-name="Preformatted_20_Text"><text:s text:c="6"/>"template": "https://github.com/SiteNetSoft/quarkus-pha/templates/components/data-display/card.html"</text:p>
      <text:p text:style-name="Preformatted_20_Text"><text:s text:c="4"/>},</text:p>
      <text:p text:style-name="Preformatted_20_Text"><text:s text:c="4"/>"sidebarNav": {</text:p>
      <text:p text:style-name="Preformatted_20_Text"><text:s text:c="6"/>"template": "https://github.com/SiteNetSoft/quarkus-pha/templates/components/navigation/nav.html"</text:p>
      <text:p text:style-name="Preformatted_20_Text"><text:s text:c="4"/>}</text:p>
      <text:p text:style-name="Preformatted_20_Text"><text:s text:c="2"/>}</text:p>
      <text:p text:style-name="Preformatted_20_Text">}</text:p>
      <text:p text:style-name="Preformatted_20_Text">```</text:p>
      <text:p text:style-name="Preformatted_20_Text"/>
      <text:p text:style-name="Preformatted_20_Text">This tells the client: "Render `sidebar.html`, and fill its `mainContent` slot with `card.html` and its `sidebarNav` slot with `nav.html`."</text:p>
      <text:p text:style-name="Preformatted_20_Text"/>
      <text:p text:style-name="Preformatted_20_Text">### 3.3 Recursive Nesting</text:p>
      <text:p text:style-name="Preformatted_20_Text"/>
      <text:p text:style-name="Preformatted_20_Text">Since each slot value is itself a view descriptor, composition nests to arbitrary depth:</text:p>
      <text:p text:style-name="Preformatted_20_Text"/>
      <text:p text:style-name="Preformatted_20_Text">```json</text:p>
      <text:p text:style-name="Preformatted_20_Text">{</text:p>
      <text:p text:style-name="Preformatted_20_Text"><text:s text:c="2"/>"template": "https://github.com/SiteNetSoft/quarkus-pha/templates/layouts/sidebar.html",</text:p>
      <text:p text:style-name="Preformatted_20_Text"><text:s text:c="2"/>"slots": {</text:p>
      <text:p text:style-name="Preformatted_20_Text"><text:s text:c="4"/>"mainContent": {</text:p>
      <text:p text:style-name="Preformatted_20_Text"><text:s text:c="6"/>"template": "https://github.com/SiteNetSoft/quarkus-pha/templates/demos/dashboard.html",</text:p>
      <text:p text:style-name="Preformatted_20_Text"><text:s text:c="6"/>"slots": {</text:p>
      <text:p text:style-name="Preformatted_20_Text"><text:s text:c="8"/>"statsRow": {</text:p>
      <text:p text:style-name="Preformatted_20_Text"><text:s text:c="10"/>"template": "https://github.com/SiteNetSoft/quarkus-pha/templates/components/data-display/card.html"</text:p>
      <text:p text:style-name="Preformatted_20_Text"><text:s text:c="8"/>},</text:p>
      <text:p text:style-name="Preformatted_20_Text"><text:s text:c="8"/>"activityTable": {</text:p>
      <text:p text:style-name="Preformatted_20_Text"><text:s text:c="10"/>"template": "https://github.com/SiteNetSoft/quarkus-pha/templates/components/data-display/table.html"</text:p>
      <text:p text:style-name="Preformatted_20_Text"><text:s text:c="8"/>},</text:p>
      <text:p text:style-name="Preformatted_20_Text"><text:s text:c="8"/>"chart": {</text:p>
      <text:p text:style-name="Preformatted_20_Text"><text:s text:c="10"/>"template": "https://github.com/SiteNetSoft/quarkus-pha/templates/components/charts/<text:soft-page-break/>chart.html",</text:p>
      <text:p text:style-name="Preformatted_20_Text"><text:s text:c="10"/>"slots": {</text:p>
      <text:p text:style-name="Preformatted_20_Text"><text:s text:c="12"/>"legend": {</text:p>
      <text:p text:style-name="Preformatted_20_Text"><text:s text:c="14"/>"template": "https://github.com/SiteNetSoft/quarkus-pha/templates/components/charts/chart-legend.html"</text:p>
      <text:p text:style-name="Preformatted_20_Text"><text:s text:c="12"/>}</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4"/>"sidebarNav": {</text:p>
      <text:p text:style-name="Preformatted_20_Text"><text:s text:c="6"/>"template": "https://github.com/SiteNetSoft/quarkus-pha/templates/components/navigation/nav.html"</text:p>
      <text:p text:style-name="Preformatted_20_Text"><text:s text:c="4"/>}</text:p>
      <text:p text:style-name="Preformatted_20_Text"><text:s text:c="2"/>}</text:p>
      <text:p text:style-name="Preformatted_20_Text">}</text:p>
      <text:p text:style-name="Preformatted_20_Text">```</text:p>
      <text:p text:style-name="Preformatted_20_Text"/>
      <text:p text:style-name="Preformatted_20_Text">### 3.4 Multiple Views</text:p>
      <text:p text:style-name="Preformatted_20_Text"/>
      <text:p text:style-name="Preformatted_20_Text">A single API response may offer multiple views (e.g., a summary view and a detail view, or views for different device classes). Use a named object at the top level:</text:p>
      <text:p text:style-name="Preformatted_20_Text"/>
      <text:p text:style-name="Preformatted_20_Text">```json</text:p>
      <text:p text:style-name="Preformatted_20_Text">{</text:p>
      <text:p text:style-name="Preformatted_20_Text"><text:s text:c="2"/>"views": {</text:p>
      <text:p text:style-name="Preformatted_20_Text"><text:s text:c="4"/>"default": {</text:p>
      <text:p text:style-name="Preformatted_20_Text"><text:s text:c="6"/>"template": "https://example.com/templates/product-detail.html"</text:p>
      <text:p text:style-name="Preformatted_20_Text"><text:s text:c="4"/>},</text:p>
      <text:p text:style-name="Preformatted_20_Text"><text:s text:c="4"/>"compact": {</text:p>
      <text:p text:style-name="Preformatted_20_Text"><text:s text:c="6"/>"template": "https://example.com/templates/product-card.html"</text:p>
      <text:p text:style-name="Preformatted_20_Text"><text:s text:c="4"/>},</text:p>
      <text:p text:style-name="Preformatted_20_Text"><text:s text:c="4"/>"mobile": {</text:p>
      <text:p text:style-name="Preformatted_20_Text"><text:s text:c="6"/>"template": "https://example.com/templates/product-mobile.html",</text:p>
      <text:p text:style-name="Preformatted_20_Text"><text:s text:c="6"/>"slots": {</text:p>
      <text:p text:style-name="Preformatted_20_Text"><text:s text:c="8"/>"gallery": {</text:p>
      <text:p text:style-name="Preformatted_20_Text"><text:s text:c="10"/>"template": "https://example.com/templates/components/swipe-gallery.html"</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p text:style-name="Preformatted_20_Text">```</text:p>
      <text:p text:style-name="Preformatted_20_Text"/>
      <text:p text:style-name="Preformatted_20_Text">When only a single view is needed, the top-level object IS the view descriptor (no `views` wrapper). When multiple views are present, the `views` key wraps them. A client SHOULD use `default` when no specific view is requested.</text:p>
      <text:p text:style-name="Preformatted_20_Text"/>
      <text:p text:style-name="Preformatted_20_Text">### 3.5 Formal Grammar</text:p>
      <text:p text:style-name="Preformatted_20_Text"/>
      <text:p text:style-name="Preformatted_20_Text">```</text:p>
      <text:p text:style-name="Preformatted_20_Text">ViewDescriptor <text:s text:c="4"/>= { "template": TemplateURL, "slots"?: Slots }</text:p>
      <text:p text:style-name="Preformatted_20_Text">TemplateURL <text:s text:c="7"/>= URI (RFC 3986)</text:p>
      <text:p text:style-name="Preformatted_20_Text">Slots <text:s text:c="13"/>= { SlotName: ViewDescriptor, ... }</text:p>
      <text:p text:style-name="Preformatted_20_Text">SlotName <text:s text:c="10"/>= string (matches an insertion point in the template)</text:p>
      <text:p text:style-name="Preformatted_20_Text"/>
      <text:p text:style-name="Preformatted_20_Text">MultiViewDescriptor = { "views": { ViewName: ViewDescriptor, ... } }</text:p>
      <text:p text:style-name="Preformatted_20_Text"><text:soft-page-break/>ViewName <text:s text:c="11"/>= string</text:p>
      <text:p text:style-name="Preformatted_20_Text">```</text:p>
      <text:p text:style-name="Preformatted_20_Text"/>
      <text:p text:style-name="Preformatted_20_Text">A valid VDP payload is either a `ViewDescriptor` or a `MultiViewDescriptor`.</text:p>
      <text:p text:style-name="Preformatted_20_Text"/>
      <text:p text:style-name="Preformatted_20_Text">## 4. Transport Mechanisms</text:p>
      <text:p text:style-name="Preformatted_20_Text"/>
      <text:p text:style-name="Preformatted_20_Text">VDP supports two transport modes. Servers MAY use either or both.</text:p>
      <text:p text:style-name="Preformatted_20_Text"/>
      <text:p text:style-name="Preformatted_20_Text">### 4.1 HTTP Link Header (Standalone Resource)</text:p>
      <text:p text:style-name="Preformatted_20_Text"/>
      <text:p text:style-name="Preformatted_20_Text">The server responds with a `Link` header pointing to a view descriptor resource:</text:p>
      <text:p text:style-name="Preformatted_20_Text"/>
      <text:p text:style-name="Preformatted_20_Text">```http</text:p>
      <text:p text:style-name="Preformatted_20_Text">HTTP/1.1 200 OK</text:p>
      <text:p text:style-name="Preformatted_20_Text">Content-Type: application/json</text:p>
      <text:p text:style-name="Preformatted_20_Text">Link: &lt;https://example.com/views/dashboard.json&gt;; rel="view-descriptor"</text:p>
      <text:p text:style-name="Preformatted_20_Text"/>
      <text:p text:style-name="Preformatted_20_Text">{"revenue": 48200, "users": 1847, "orders": 312}</text:p>
      <text:p text:style-name="Preformatted_20_Text">```</text:p>
      <text:p text:style-name="Preformatted_20_Text"/>
      <text:p text:style-name="Preformatted_20_Text">The client fetches `https://example.com/views/dashboard.json` to get the view descriptor. This approach:</text:p>
      <text:p text:style-name="Preformatted_20_Text">- Keeps the data payload completely clean</text:p>
      <text:p text:style-name="Preformatted_20_Text">- Works with **any** data format (JSON, XML, OData4, GraphQL, Protocol Buffers)</text:p>
      <text:p text:style-name="Preformatted_20_Text">- The view descriptor resource is independently cacheable</text:p>
      <text:p text:style-name="Preformatted_20_Text">- Uses existing web standards (RFC 8288 Link Relations)</text:p>
      <text:p text:style-name="Preformatted_20_Text"/>
      <text:p text:style-name="Preformatted_20_Text">**For simple cases** (single template, no composition), a shorthand header is also defined:</text:p>
      <text:p text:style-name="Preformatted_20_Text"/>
      <text:p text:style-name="Preformatted_20_Text">```http</text:p>
      <text:p text:style-name="Preformatted_20_Text">View-Template: https://example.com/templates/article.html</text:p>
      <text:p text:style-name="Preformatted_20_Text">```</text:p>
      <text:p text:style-name="Preformatted_20_Text"/>
      <text:p text:style-name="Preformatted_20_Text">When `View-Template` is present, it is equivalent to `{"template": "&lt;URL&gt;"}`. If both `Link` (with `rel="view-descriptor"`) and `View-Template` are present, the `Link` header takes precedence.</text:p>
      <text:p text:style-name="Preformatted_20_Text"/>
      <text:p text:style-name="Preformatted_20_Text">### 4.2 Inline in Response Body</text:p>
      <text:p text:style-name="Preformatted_20_Text"/>
      <text:p text:style-name="Preformatted_20_Text">When the data format is flexible (e.g., HAL+JSON, custom APIs), embed the view descriptor directly using the `_view` key:</text:p>
      <text:p text:style-name="Preformatted_20_Text"/>
      <text:p text:style-name="Preformatted_20_Text">```json</text:p>
      <text:p text:style-name="Preformatted_20_Text">{</text:p>
      <text:p text:style-name="Preformatted_20_Text"><text:s text:c="2"/>"_links": {</text:p>
      <text:p text:style-name="Preformatted_20_Text"><text:s text:c="4"/>"self": { "href": "/api/dashboard" }</text:p>
      <text:p text:style-name="Preformatted_20_Text"><text:s text:c="2"/>},</text:p>
      <text:p text:style-name="Preformatted_20_Text"><text:s text:c="2"/>"_view": {</text:p>
      <text:p text:style-name="Preformatted_20_Text"><text:s text:c="4"/>"template": "https://github.com/SiteNetSoft/quarkus-pha/templates/demos/dashboard.html",</text:p>
      <text:p text:style-name="Preformatted_20_Text"><text:s text:c="4"/>"slots": {</text:p>
      <text:p text:style-name="Preformatted_20_Text"><text:s text:c="6"/>"statsRow": {</text:p>
      <text:p text:style-name="Preformatted_20_Text"><text:s text:c="8"/>"template": "https://github.com/SiteNetSoft/quarkus-pha/templates/components/data-display/card.html"</text:p>
      <text:p text:style-name="Preformatted_20_Text"><text:s text:c="6"/>}</text:p>
      <text:p text:style-name="Preformatted_20_Text"><text:s text:c="4"/>}</text:p>
      <text:p text:style-name="Preformatted_20_Text"><text:soft-page-break/><text:s text:c="2"/>},</text:p>
      <text:p text:style-name="Preformatted_20_Text"><text:s text:c="2"/>"revenue": 48200,</text:p>
      <text:p text:style-name="Preformatted_20_Text"><text:s text:c="2"/>"users": 1847,</text:p>
      <text:p text:style-name="Preformatted_20_Text"><text:s text:c="2"/>"orders": 312</text:p>
      <text:p text:style-name="Preformatted_20_Text">}</text:p>
      <text:p text:style-name="Preformatted_20_Text">```</text:p>
      <text:p text:style-name="Preformatted_20_Text"/>
      <text:p text:style-name="Preformatted_20_Text">The `_view` key follows HAL's underscore convention for protocol-level metadata.</text:p>
      <text:p text:style-name="Preformatted_20_Text"/>
      <text:p text:style-name="Preformatted_20_Text">For **multiple views**, use `_views`:</text:p>
      <text:p text:style-name="Preformatted_20_Text"/>
      <text:p text:style-name="Preformatted_20_Text">```json</text:p>
      <text:p text:style-name="Preformatted_20_Text">{</text:p>
      <text:p text:style-name="Preformatted_20_Text"><text:s text:c="2"/>"_views": {</text:p>
      <text:p text:style-name="Preformatted_20_Text"><text:s text:c="4"/>"default": {</text:p>
      <text:p text:style-name="Preformatted_20_Text"><text:s text:c="6"/>"template": "https://example.com/templates/dashboard-full.html",</text:p>
      <text:p text:style-name="Preformatted_20_Text"><text:s text:c="6"/>"slots": { ... }</text:p>
      <text:p text:style-name="Preformatted_20_Text"><text:s text:c="4"/>},</text:p>
      <text:p text:style-name="Preformatted_20_Text"><text:s text:c="4"/>"widget": {</text:p>
      <text:p text:style-name="Preformatted_20_Text"><text:s text:c="6"/>"template": "https://example.com/templates/dashboard-widget.html"</text:p>
      <text:p text:style-name="Preformatted_20_Text"><text:s text:c="4"/>}</text:p>
      <text:p text:style-name="Preformatted_20_Text"><text:s text:c="2"/>},</text:p>
      <text:p text:style-name="Preformatted_20_Text"><text:s text:c="2"/>"revenue": 48200,</text:p>
      <text:p text:style-name="Preformatted_20_Text"><text:s text:c="2"/>"users": 1847</text:p>
      <text:p text:style-name="Preformatted_20_Text">}</text:p>
      <text:p text:style-name="Preformatted_20_Text">```</text:p>
      <text:p text:style-name="Preformatted_20_Text"/>
      <text:p text:style-name="Preformatted_20_Text">### 4.3 OData4 Compatibility</text:p>
      <text:p text:style-name="Preformatted_20_Text"/>
      <text:p text:style-name="Preformatted_20_Text">OData4 responses have a rigid structure but support custom instance annotations. Use an annotation to reference a view descriptor resource:</text:p>
      <text:p text:style-name="Preformatted_20_Text"/>
      <text:p text:style-name="Preformatted_20_Text">```json</text:p>
      <text:p text:style-name="Preformatted_20_Text">{</text:p>
      <text:p text:style-name="Preformatted_20_Text"><text:s text:c="2"/>"@odata.context": "https://example.com/odata/$metadata#Products",</text:p>
      <text:p text:style-name="Preformatted_20_Text"><text:s text:c="2"/>"@View.descriptor": "https://example.com/views/product-list.json",</text:p>
      <text:p text:style-name="Preformatted_20_Text"><text:s text:c="2"/>"value": [</text:p>
      <text:p text:style-name="Preformatted_20_Text"><text:s text:c="4"/>{ "ProductID": 1, "Name": "Widget", "Price": 9.99 },</text:p>
      <text:p text:style-name="Preformatted_20_Text"><text:s text:c="4"/>{ "ProductID": 2, "Name": "Gadget", "Price": 24.99 }</text:p>
      <text:p text:style-name="Preformatted_20_Text"><text:s text:c="2"/>]</text:p>
      <text:p text:style-name="Preformatted_20_Text">}</text:p>
      <text:p text:style-name="Preformatted_20_Text">```</text:p>
      <text:p text:style-name="Preformatted_20_Text"/>
      <text:p text:style-name="Preformatted_20_Text">Alternatively, use the `Link` header approach (Section 4.1) to avoid touching the OData body entirely.</text:p>
      <text:p text:style-name="Preformatted_20_Text"/>
      <text:p text:style-name="Preformatted_20_Text">### 4.4 Precedence</text:p>
      <text:p text:style-name="Preformatted_20_Text"/>
      <text:p text:style-name="Preformatted_20_Text">When a view descriptor is provided via multiple mechanisms, precedence is:</text:p>
      <text:p text:style-name="Preformatted_20_Text">1. Inline body (`_view` / `_views`) — most specific</text:p>
      <text:p text:style-name="Preformatted_20_Text">2. `Link` header with `rel="view-descriptor"`</text:p>
      <text:p text:style-name="Preformatted_20_Text">3. `View-Template` header</text:p>
      <text:p text:style-name="Preformatted_20_Text"/>
      <text:p text:style-name="Preformatted_20_Text">## 5. View Descriptor Resources</text:p>
      <text:p text:style-name="Preformatted_20_Text"/>
      <text:p text:style-name="Preformatted_20_Text">### 5.1 Media Type</text:p>
      <text:p text:style-name="Preformatted_20_Text"/>
      <text:p text:style-name="Preformatted_20_Text">View descriptor resources SHOULD be served with:</text:p>
      <text:p text:style-name="Preformatted_20_Text"/>
      <text:p text:style-name="Preformatted_20_Text"><text:soft-page-break/>```</text:p>
      <text:p text:style-name="Preformatted_20_Text">Content-Type: application/vdp+json</text:p>
      <text:p text:style-name="Preformatted_20_Text">```</text:p>
      <text:p text:style-name="Preformatted_20_Text"/>
      <text:p text:style-name="Preformatted_20_Text">### 5.2 Caching</text:p>
      <text:p text:style-name="Preformatted_20_Text"/>
      <text:p text:style-name="Preformatted_20_Text">View descriptor resources are independently cacheable. Servers SHOULD provide standard HTTP caching headers:</text:p>
      <text:p text:style-name="Preformatted_20_Text"/>
      <text:p text:style-name="Preformatted_20_Text">```http</text:p>
      <text:p text:style-name="Preformatted_20_Text">HTTP/1.1 200 OK</text:p>
      <text:p text:style-name="Preformatted_20_Text">Content-Type: application/vdp+json</text:p>
      <text:p text:style-name="Preformatted_20_Text">Cache-Control: public, max-age=3600</text:p>
      <text:p text:style-name="Preformatted_20_Text">ETag: "v2-dashboard"</text:p>
      <text:p text:style-name="Preformatted_20_Text"/>
      <text:p text:style-name="Preformatted_20_Text">{</text:p>
      <text:p text:style-name="Preformatted_20_Text"><text:s text:c="2"/>"template": "https://example.com/templates/dashboard.html",</text:p>
      <text:p text:style-name="Preformatted_20_Text"><text:s text:c="2"/>"slots": { ... }</text:p>
      <text:p text:style-name="Preformatted_20_Text">}</text:p>
      <text:p text:style-name="Preformatted_20_Text">```</text:p>
      <text:p text:style-name="Preformatted_20_Text"/>
      <text:p text:style-name="Preformatted_20_Text">Template URLs themselves are also cacheable resources. Clients SHOULD cache resolved templates according to their HTTP caching headers.</text:p>
      <text:p text:style-name="Preformatted_20_Text"/>
      <text:p text:style-name="Preformatted_20_Text">### 5.3 Versioning</text:p>
      <text:p text:style-name="Preformatted_20_Text"/>
      <text:p text:style-name="Preformatted_20_Text">View descriptors can be versioned by URL convention:</text:p>
      <text:p text:style-name="Preformatted_20_Text"/>
      <text:p text:style-name="Preformatted_20_Text">```</text:p>
      <text:p text:style-name="Preformatted_20_Text">https://example.com/views/v2/dashboard.json</text:p>
      <text:p text:style-name="Preformatted_20_Text">https://example.com/views/dashboard.json?v=2</text:p>
      <text:p text:style-name="Preformatted_20_Text">```</text:p>
      <text:p text:style-name="Preformatted_20_Text"/>
      <text:p text:style-name="Preformatted_20_Text">Or by content negotiation using the `Accept` header with a version parameter:</text:p>
      <text:p text:style-name="Preformatted_20_Text"/>
      <text:p text:style-name="Preformatted_20_Text">```</text:p>
      <text:p text:style-name="Preformatted_20_Text">Accept: application/vdp+json; version=2</text:p>
      <text:p text:style-name="Preformatted_20_Text">```</text:p>
      <text:p text:style-name="Preformatted_20_Text"/>
      <text:p text:style-name="Preformatted_20_Text">## 6. Template Requirements</text:p>
      <text:p text:style-name="Preformatted_20_Text"/>
      <text:p text:style-name="Preformatted_20_Text">VDP is agnostic to the template language. However, templates used with VDP MUST satisfy one requirement: **named insertion points (slots) that can be filled externally**.</text:p>
      <text:p text:style-name="Preformatted_20_Text"/>
      <text:p text:style-name="Preformatted_20_Text">### 6.1 Framework Slot Mappings</text:p>
      <text:p text:style-name="Preformatted_20_Text"/>
      <text:p text:style-name="Preformatted_20_Text">| Framework | Slot Mechanism | Example |</text:p>
      <text:p text:style-name="Preformatted_20_Text">|-----------|---------------|---------|</text:p>
      <text:p text:style-name="Preformatted_20_Text">| Qute | `{#insert slotName}{/insert}` | `{#insert mainContent}Default{/insert}` |</text:p>
      <text:p text:style-name="Preformatted_20_Text">| HTML `&lt;template&gt;` | `&lt;slot name="slotName"&gt;` | `&lt;slot name="mainContent"&gt;&lt;/slot&gt;` |</text:p>
      <text:p text:style-name="Preformatted_20_Text">| HTMT | `ht-template="slotName"` | `&lt;div ht-template="mainContent"&gt;&lt;/div&gt;` |</text:p>
      <text:p text:style-name="Preformatted_20_Text">| Thymeleaf | `th:fragment` / `th:replace` | `&lt;div th:replace="~{slotName}"&gt;&lt;/div&gt;` |</text:p>
      <text:p text:style-name="Preformatted_20_Text">| JSX/React | `props.children` or named props | `{props.mainContent}` |</text:p>
      <text:p text:style-name="Preformatted_20_Text">| SwiftUI | `@ViewBuilder` parameters | `var mainContent: () -&gt; Content` |</text:p>
      <text:p text:style-name="Preformatted_20_Text">| Jetpack Compose | `@Composable` slot parameters | `mainContent: @Composable () -&gt; Unit` |</text:p>
      <text:p text:style-name="Preformatted_20_Text"><text:soft-page-break/></text:p>
      <text:p text:style-name="Preformatted_20_Text">### 6.2 Static vs Dynamic Slots</text:p>
      <text:p text:style-name="Preformatted_20_Text"/>
      <text:p text:style-name="Preformatted_20_Text">Not all insertion points in a template need to be managed by VDP. Templates commonly include static partials (like a shared `_head.html` or a footer) that are hardcoded. Only slots that vary per API response need to appear in the view descriptor.</text:p>
      <text:p text:style-name="Preformatted_20_Text"/>
      <text:p text:style-name="Preformatted_20_Text">## 7. Examples</text:p>
      <text:p text:style-name="Preformatted_20_Text"/>
      <text:p text:style-name="Preformatted_20_Text">### 7.1 Login Page (Simple, No Slots)</text:p>
      <text:p text:style-name="Preformatted_20_Text"/>
      <text:p text:style-name="Preformatted_20_Text">**API Response:**</text:p>
      <text:p text:style-name="Preformatted_20_Text">```http</text:p>
      <text:p text:style-name="Preformatted_20_Text">HTTP/1.1 200 OK</text:p>
      <text:p text:style-name="Preformatted_20_Text">Content-Type: application/json</text:p>
      <text:p text:style-name="Preformatted_20_Text">View-Template: https://github.com/SiteNetSoft/quarkus-pha/templates/components/forms/form.html</text:p>
      <text:p text:style-name="Preformatted_20_Text"/>
      <text:p text:style-name="Preformatted_20_Text">{</text:p>
      <text:p text:style-name="Preformatted_20_Text"><text:s text:c="2"/>"csrfToken": "abc123",</text:p>
      <text:p text:style-name="Preformatted_20_Text"><text:s text:c="2"/>"loginUrl": "/auth/login",</text:p>
      <text:p text:style-name="Preformatted_20_Text"><text:s text:c="2"/>"fields": [</text:p>
      <text:p text:style-name="Preformatted_20_Text"><text:s text:c="4"/>{ "name": "username", "type": "text", "label": "Username", "required": true },</text:p>
      <text:p text:style-name="Preformatted_20_Text"><text:s text:c="4"/>{ "name": "password", "type": "password", "label": "Password", "required": true }</text:p>
      <text:p text:style-name="Preformatted_20_Text"><text:s text:c="2"/>]</text:p>
      <text:p text:style-name="Preformatted_20_Text">}</text:p>
      <text:p text:style-name="Preformatted_20_Text">```</text:p>
      <text:p text:style-name="Preformatted_20_Text"/>
      <text:p text:style-name="Preformatted_20_Text">### 7.2 Dashboard (Composed Template Tree)</text:p>
      <text:p text:style-name="Preformatted_20_Text"/>
      <text:p text:style-name="Preformatted_20_Text">**API Response:**</text:p>
      <text:p text:style-name="Preformatted_20_Text">```http</text:p>
      <text:p text:style-name="Preformatted_20_Text">HTTP/1.1 200 OK</text:p>
      <text:p text:style-name="Preformatted_20_Text">Content-Type: application/hal+json</text:p>
      <text:p text:style-name="Preformatted_20_Text">Link: &lt;https://github.com/SiteNetSoft/quarkus-pha/views/dashboard.json&gt;; rel="view-descriptor"</text:p>
      <text:p text:style-name="Preformatted_20_Text"/>
      <text:p text:style-name="Preformatted_20_Text">{</text:p>
      <text:p text:style-name="Preformatted_20_Text"><text:s text:c="2"/>"_links": { "self": { "href": "/api/dashboard" } },</text:p>
      <text:p text:style-name="Preformatted_20_Text"><text:s text:c="2"/>"stats": { "revenue": 48200, "users": 1847, "orders": 312 },</text:p>
      <text:p text:style-name="Preformatted_20_Text"><text:s text:c="2"/>"recentActivity": [</text:p>
      <text:p text:style-name="Preformatted_20_Text"><text:s text:c="4"/>{ "user": "alice", "action": "purchase", "item": "Widget Pro", "time": "2m ago" },</text:p>
      <text:p text:style-name="Preformatted_20_Text"><text:s text:c="4"/>{ "user": "bob", "action": "signup", "time": "15m ago" }</text:p>
      <text:p text:style-name="Preformatted_20_Text"><text:s text:c="2"/>],</text:p>
      <text:p text:style-name="Preformatted_20_Text"><text:s text:c="2"/>"chartData": { "labels": ["Mon","Tue","Wed","Thu","Fri"], "values": [12,19,3,5,2] }</text:p>
      <text:p text:style-name="Preformatted_20_Text">}</text:p>
      <text:p text:style-name="Preformatted_20_Text">```</text:p>
      <text:p text:style-name="Preformatted_20_Text"/>
      <text:p text:style-name="Preformatted_20_Text">**View Descriptor Resource** (`dashboard.json`):</text:p>
      <text:p text:style-name="Preformatted_20_Text">```json</text:p>
      <text:p text:style-name="Preformatted_20_Text">{</text:p>
      <text:p text:style-name="Preformatted_20_Text"><text:s text:c="2"/>"template": "https://github.com/SiteNetSoft/quarkus-pha/templates/layouts/sidebar.html",</text:p>
      <text:p text:style-name="Preformatted_20_Text"><text:s text:c="2"/>"slots": {</text:p>
      <text:p text:style-name="Preformatted_20_Text"><text:s text:c="4"/>"sidebarNav": {</text:p>
      <text:p text:style-name="Preformatted_20_Text"><text:soft-page-break/><text:s text:c="6"/>"template": "https://github.com/SiteNetSoft/quarkus-pha/templates/components/navigation/nav.html"</text:p>
      <text:p text:style-name="Preformatted_20_Text"><text:s text:c="4"/>},</text:p>
      <text:p text:style-name="Preformatted_20_Text"><text:s text:c="4"/>"mainContent": {</text:p>
      <text:p text:style-name="Preformatted_20_Text"><text:s text:c="6"/>"template": "https://github.com/SiteNetSoft/quarkus-pha/templates/demos/dashboard.html",</text:p>
      <text:p text:style-name="Preformatted_20_Text"><text:s text:c="6"/>"slots": {</text:p>
      <text:p text:style-name="Preformatted_20_Text"><text:s text:c="8"/>"statsCards": {</text:p>
      <text:p text:style-name="Preformatted_20_Text"><text:s text:c="10"/>"template": "https://github.com/SiteNetSoft/quarkus-pha/templates/components/data-display/card.html"</text:p>
      <text:p text:style-name="Preformatted_20_Text"><text:s text:c="8"/>},</text:p>
      <text:p text:style-name="Preformatted_20_Text"><text:s text:c="8"/>"activityTable": {</text:p>
      <text:p text:style-name="Preformatted_20_Text"><text:s text:c="10"/>"template": "https://github.com/SiteNetSoft/quarkus-pha/templates/components/data-display/table.html"</text:p>
      <text:p text:style-name="Preformatted_20_Text"><text:s text:c="8"/>},</text:p>
      <text:p text:style-name="Preformatted_20_Text"><text:s text:c="8"/>"revenueChart": {</text:p>
      <text:p text:style-name="Preformatted_20_Text"><text:s text:c="10"/>"template": "https://github.com/SiteNetSoft/quarkus-pha/templates/components/charts/chart.html"</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p text:style-name="Preformatted_20_Text">```</text:p>
      <text:p text:style-name="Preformatted_20_Text"/>
      <text:p text:style-name="Preformatted_20_Text">### 7.3 OData4 Product List</text:p>
      <text:p text:style-name="Preformatted_20_Text"/>
      <text:p text:style-name="Preformatted_20_Text">```http</text:p>
      <text:p text:style-name="Preformatted_20_Text">HTTP/1.1 200 OK</text:p>
      <text:p text:style-name="Preformatted_20_Text">Content-Type: application/json;odata.metadata=minimal</text:p>
      <text:p text:style-name="Preformatted_20_Text">Link: &lt;https://example.com/views/product-list.json&gt;; rel="view-descriptor"</text:p>
      <text:p text:style-name="Preformatted_20_Text"/>
      <text:p text:style-name="Preformatted_20_Text">{</text:p>
      <text:p text:style-name="Preformatted_20_Text"><text:s text:c="2"/>"@odata.context": "https://example.com/odata/$metadata#Products",</text:p>
      <text:p text:style-name="Preformatted_20_Text"><text:s text:c="2"/>"value": [</text:p>
      <text:p text:style-name="Preformatted_20_Text"><text:s text:c="4"/>{ "ProductID": 1, "Name": "Widget", "Price": 9.99 },</text:p>
      <text:p text:style-name="Preformatted_20_Text"><text:s text:c="4"/>{ "ProductID": 2, "Name": "Gadget", "Price": 24.99 }</text:p>
      <text:p text:style-name="Preformatted_20_Text"><text:s text:c="2"/>]</text:p>
      <text:p text:style-name="Preformatted_20_Text">}</text:p>
      <text:p text:style-name="Preformatted_20_Text">```</text:p>
      <text:p text:style-name="Preformatted_20_Text"/>
      <text:p text:style-name="Preformatted_20_Text">Data payload is pure OData4. The view descriptor is communicated entirely via the `Link` header.</text:p>
      <text:p text:style-name="Preformatted_20_Text"/>
      <text:p text:style-name="Preformatted_20_Text">### 7.4 Multiple Views (Responsive)</text:p>
      <text:p text:style-name="Preformatted_20_Text"/>
      <text:p text:style-name="Preformatted_20_Text">```json</text:p>
      <text:p text:style-name="Preformatted_20_Text">{</text:p>
      <text:p text:style-name="Preformatted_20_Text"><text:s text:c="2"/>"_views": {</text:p>
      <text:p text:style-name="Preformatted_20_Text"><text:s text:c="4"/>"default": {</text:p>
      <text:p text:style-name="Preformatted_20_Text"><text:s text:c="6"/>"template": "https://example.com/templates/product-detail.html",</text:p>
      <text:p text:style-name="Preformatted_20_Text"><text:s text:c="6"/>"slots": {</text:p>
      <text:p text:style-name="Preformatted_20_Text"><text:s text:c="8"/>"gallery": {</text:p>
      <text:p text:style-name="Preformatted_20_Text"><text:s text:c="10"/>"template": "https://example.com/templates/components/image-carousel.html"</text:p>
      <text:p text:style-name="Preformatted_20_Text"><text:s text:c="8"/>},</text:p>
      <text:p text:style-name="Preformatted_20_Text"><text:soft-page-break/><text:s text:c="8"/>"reviews": {</text:p>
      <text:p text:style-name="Preformatted_20_Text"><text:s text:c="10"/>"template": "https://example.com/templates/components/review-list.html"</text:p>
      <text:p text:style-name="Preformatted_20_Text"><text:s text:c="8"/>}</text:p>
      <text:p text:style-name="Preformatted_20_Text"><text:s text:c="6"/>}</text:p>
      <text:p text:style-name="Preformatted_20_Text"><text:s text:c="4"/>},</text:p>
      <text:p text:style-name="Preformatted_20_Text"><text:s text:c="4"/>"compact": {</text:p>
      <text:p text:style-name="Preformatted_20_Text"><text:s text:c="6"/>"template": "https://example.com/templates/product-card.html"</text:p>
      <text:p text:style-name="Preformatted_20_Text"><text:s text:c="4"/>}</text:p>
      <text:p text:style-name="Preformatted_20_Text"><text:s text:c="2"/>},</text:p>
      <text:p text:style-name="Preformatted_20_Text"><text:s text:c="2"/>"id": 42,</text:p>
      <text:p text:style-name="Preformatted_20_Text"><text:s text:c="2"/>"name": "Widget Pro",</text:p>
      <text:p text:style-name="Preformatted_20_Text"><text:s text:c="2"/>"price": 29.99,</text:p>
      <text:p text:style-name="Preformatted_20_Text"><text:s text:c="2"/>"images": ["front.jpg", "side.jpg", "back.jpg"],</text:p>
      <text:p text:style-name="Preformatted_20_Text"><text:s text:c="2"/>"reviews": [</text:p>
      <text:p text:style-name="Preformatted_20_Text"><text:s text:c="4"/>{ "author": "Alice", "rating": 5, "text": "Excellent!" }</text:p>
      <text:p text:style-name="Preformatted_20_Text"><text:s text:c="2"/>]</text:p>
      <text:p text:style-name="Preformatted_20_Text">}</text:p>
      <text:p text:style-name="Preformatted_20_Text">```</text:p>
      <text:p text:style-name="Preformatted_20_Text"/>
      <text:p text:style-name="Preformatted_20_Text">### 7.5 BFF (Backend for Frontend) Pattern</text:p>
      <text:p text:style-name="Preformatted_20_Text"/>
      <text:p text:style-name="Preformatted_20_Text">A BFF receives an API response and a view descriptor. Instead of forwarding both to the browser, the BFF resolves the template tree server-side and returns rendered HTML:</text:p>
      <text:p text:style-name="Preformatted_20_Text"/>
      <text:p text:style-name="Preformatted_20_Text">```</text:p>
      <text:p text:style-name="Preformatted_20_Text">Browser → GET /dashboard</text:p>
      <text:p text:style-name="Preformatted_20_Text">BFF → GET /api/dashboard (receives data + Link header with view descriptor)</text:p>
      <text:p text:style-name="Preformatted_20_Text">BFF → Fetches view descriptor</text:p>
      <text:p text:style-name="Preformatted_20_Text">BFF → Fetches templates (with caching)</text:p>
      <text:p text:style-name="Preformatted_20_Text">BFF → Renders composed template tree with data (using Qute, Thymeleaf, etc.)</text:p>
      <text:p text:style-name="Preformatted_20_Text">BFF → Returns rendered HTML to browser</text:p>
      <text:p text:style-name="Preformatted_20_Text">```</text:p>
      <text:p text:style-name="Preformatted_20_Text"/>
      <text:p text:style-name="Preformatted_20_Text">This is the pattern used by **quarkus-pha**: Quarkus acts as the BFF, fetching data and resolving Qute templates server-side.</text:p>
      <text:p text:style-name="Preformatted_20_Text"/>
      <text:p text:style-name="Preformatted_20_Text">## 8. Client Resolution Algorithm</text:p>
      <text:p text:style-name="Preformatted_20_Text"/>
      <text:p text:style-name="Preformatted_20_Text">1. **Extract view descriptor** from the response (check `_view`/`_views` body key, then `Link` header, then `View-Template` header).</text:p>
      <text:p text:style-name="Preformatted_20_Text">2. **Fetch the view descriptor** if it is a URL reference (cache as appropriate).</text:p>
      <text:p text:style-name="Preformatted_20_Text">3. **Fetch the root template** from the `template` URL.</text:p>
      <text:p text:style-name="Preformatted_20_Text">4. **Identify slot insertion points** in the template.</text:p>
      <text:p text:style-name="Preformatted_20_Text">5. **For each slot** declared in the view descriptor:</text:p>
      <text:p text:style-name="Preformatted_20_Text"><text:s text:c="3"/>a. Fetch the sub-template from its `template` URL.</text:p>
      <text:p text:style-name="Preformatted_20_Text"><text:s text:c="3"/>b. If the sub-template's view descriptor has `slots`, recurse (go to step 4).</text:p>
      <text:p text:style-name="Preformatted_20_Text"><text:s text:c="3"/>c. Insert the resolved sub-template into the slot.</text:p>
      <text:p text:style-name="Preformatted_20_Text">6. **Render** the composed template tree with the API response data.</text:p>
      <text:p text:style-name="Preformatted_20_Text"/>
      <text:p text:style-name="Preformatted_20_Text">Clients SHOULD impose a maximum recursion depth (RECOMMENDED: 10 levels) to prevent unbounded nesting.</text:p>
      <text:p text:style-name="Preformatted_20_Text"/>
      <text:p text:style-name="Preformatted_20_Text">## 9. Security Considerations</text:p>
      <text:p text:style-name="Preformatted_20_Text"/>
      <text:p text:style-name="Preformatted_20_Text">- **Template URL validation**: Clients MUST validate template URLs against an allowlist of trusted domains. Rendering arbitrary templates from untrusted sources is a code injection risk.</text:p>
      <text:p text:style-name="Preformatted_20_Text">- **CORS**: Template resources served cross-origin MUST include appropriate CORS <text:soft-page-break/>headers.</text:p>
      <text:p text:style-name="Preformatted_20_Text">- **Content Security Policy**: Template URLs SHOULD be included in the `script-src` or `style-src` CSP directives as appropriate.</text:p>
      <text:p text:style-name="Preformatted_20_Text">- **Template sandboxing**: Clients SHOULD render templates in a sandboxed context to prevent template injection attacks.</text:p>
      <text:p text:style-name="Preformatted_20_Text">- **HTTPS**: Template URLs MUST use HTTPS in production. Clients SHOULD reject HTTP template URLs.</text:p>
      <text:p text:style-name="Preformatted_20_Text"/>
      <text:p text:style-name="Preformatted_20_Text">## 10. Relationship to Existing Standards</text:p>
      <text:p text:style-name="Preformatted_20_Text"/>
      <text:p text:style-name="Preformatted_20_Text">| Standard | Relationship |</text:p>
      <text:p text:style-name="Preformatted_20_Text">|----------|-------------|</text:p>
      <text:p text:style-name="Preformatted_20_Text">| REST | VDP extends REST responses with view metadata without modifying the resource representation itself |</text:p>
      <text:p text:style-name="Preformatted_20_Text">| HAL (RFC draft) | VDP uses HAL's underscore convention (`_view`) for inline transport. Compatible with `_links` and `_embedded` |</text:p>
      <text:p text:style-name="Preformatted_20_Text">| JSON-LD | VDP can coexist with `@context`/`@type` annotations. Template URLs could be expressed as JSON-LD `@id` values |</text:p>
      <text:p text:style-name="Preformatted_20_Text">| OData4 | VDP uses OData4 instance annotations (`@View.descriptor`) or HTTP headers for compatibility |</text:p>
      <text:p text:style-name="Preformatted_20_Text">| RFC 8288 (Web Linking) | VDP defines the `view-descriptor` link relation type for the `Link` header |</text:p>
      <text:p text:style-name="Preformatted_20_Text">| HATEOAS | VDP is complementary — HATEOAS tells clients what actions are available, VDP tells clients how to render the result |</text:p>
      <text:p text:style-name="Preformatted_20_Text"/>
      <text:p text:style-name="Preformatted_20_Text">## 11. IANA Considerations</text:p>
      <text:p text:style-name="Preformatted_20_Text"/>
      <text:p text:style-name="Preformatted_20_Text">This specification requests registration of:</text:p>
      <text:p text:style-name="Preformatted_20_Text"/>
      <text:p text:style-name="Preformatted_20_Text">### 11.1 Link Relation Type</text:p>
      <text:p text:style-name="Preformatted_20_Text"/>
      <text:p text:style-name="Preformatted_20_Text">- **Relation Name:** `view-descriptor`</text:p>
      <text:p text:style-name="Preformatted_20_Text">- **Description:** Refers to a VDP view descriptor resource that describes how to render the linked resource.</text:p>
      <text:p text:style-name="Preformatted_20_Text">- **Reference:** This specification</text:p>
      <text:p text:style-name="Preformatted_20_Text"/>
      <text:p text:style-name="Preformatted_20_Text">### 11.2 Media Type</text:p>
      <text:p text:style-name="Preformatted_20_Text"/>
      <text:p text:style-name="Preformatted_20_Text">- **Type name:** application</text:p>
      <text:p text:style-name="Preformatted_20_Text">- **Subtype name:** vdp+json</text:p>
      <text:p text:style-name="Preformatted_20_Text">- **Required parameters:** None</text:p>
      <text:p text:style-name="Preformatted_20_Text">- **Optional parameters:** `version`</text:p>
      <text:p text:style-name="Preformatted_20_Text">- **Reference:** This specification</text:p>
      <text:p text:style-name="Preformatted_20_Text"/>
      <text:p text:style-name="Preformatted_20_Text">---</text:p>
      <text:p text:style-name="Preformatted_20_Text"/>
      <text:p text:style-name="Preformatted_20_Text">## Open Questions</text:p>
      <text:p text:style-name="Preformatted_20_Text"/>
      <text:p text:style-name="Preformatted_20_Text">1. **Naming**: "View Descriptor Protocol" is a working title. Alternatives: View Template Linking (VTL), Hypermedia View Protocol (HVP), Template Resolution Protocol (TRP). Input welcome.</text:p>
      <text:p text:style-name="Preformatted_20_Text">2. **Slot arrays**: Should a slot support multiple templates (rendered in sequence)? E.g., `"sidebar": [{"template": "nav.html"}, {"template": "user-info.html"}]`</text:p>
      <text:p text:style-name="Preformatted_20_Text">3. **Conditional slots**: Should the spec support conditional slot filling (e.g., "use this template if the user is admin, that one otherwise")? Or is that the server's job (send different view descriptors per role)?</text:p>
      <text:p text:style-name="Preformatted_20_Text">4. **Template parameters**: Should view descriptors support passing static parameters to templates (beyond the API data)? E.g., `{"template": "card.html", <text:soft-page-break/>"params": {"compact": true, "variant": "primary"}}`</text:p>
      <text:p text:style-name="Preformatted_20_Text">5. **Discovery**: Should APIs advertise VDP support via a standard mechanism (e.g., `OPTIONS` response, API manif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0" meta:image-count="0" meta:object-count="0" meta:page-count="11" meta:paragraph-count="382" meta:word-count="2181" meta:character-count="17777" meta:non-whitespace-character-count="15224"/>
    <meta:generator>LibreOffice/25.8.4.2$Linux_X86_64 LibreOffice_project/580$Build-2</meta:generator>
  </office:meta>
</office:document-meta>
</file>